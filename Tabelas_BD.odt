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-- ======= Tabelas do domínio =======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OMMENT ON TABLE public.veiculos IS 'Cadastro principal de viaturas: identificação, características, status operacional e vínculos.';</text:span></text:span></text:p>
      <text:p text:style-name="P2"><text:span text:style-name="Strong_20_Emphasis"><text:span text:style-name="T1">COMMENT ON TABLE public.marca_modelos IS 'Catálogo de marcas e modelos de viaturas.';</text:span></text:span></text:p>
      <text:p text:style-name="P2"><text:span text:style-name="Strong_20_Emphasis"><text:span text:style-name="T1">COMMENT ON TABLE public.documento_veiculos IS 'Documentos obrigatórios por veículo (tipo, número, datas de emissão/validade).';</text:span></text:span></text:p>
      <text:p text:style-name="P2"><text:span text:style-name="Strong_20_Emphasis"><text:span text:style-name="T1">COMMENT ON TABLE public.seguros IS 'Apólices de seguro e respectivas vigências atreladas às viaturas.';</text:span></text:span></text:p>
      <text:p text:style-name="P2"><text:span text:style-name="Strong_20_Emphasis"><text:span text:style-name="T1">COMMENT ON TABLE public.veiculo_lotacoes IS 'Histórico de lotação/afetação das viaturas nas OPMs (com data inicial/final).';</text:span></text:span></text:p>
      <text:p text:style-name="P2"><text:span text:style-name="Strong_20_Emphasis"><text:span text:style-name="T1">COMMENT ON TABLE public.manutencoes IS 'Registros de manutenção preventiva/corretiva (datas, tipo, status e descrição).';</text:span></text:span></text:p>
      <text:p text:style-name="P2"><text:span text:style-name="Strong_20_Emphasis"><text:span text:style-name="T1">COMMENT ON TABLE public.abastecimentos IS 'Lançamentos de abastecimento (data, odômetro, volume e custo) para controle de consumo.';</text:span></text:span></text:p>
      <text:p text:style-name="P2"><text:span text:style-name="Strong_20_Emphasis"><text:span text:style-name="T1">COMMENT ON TABLE public.multas IS 'Autos de infração associados às viaturas.';</text:span></text:span></text:p>
      <text:p text:style-name="P2"><text:span text:style-name="Strong_20_Emphasis"><text:span text:style-name="T1">COMMENT ON TABLE public.movimentacaos IS 'Movimentações e transferências operacionais das viaturas.';</text:span></text:span></text:p>
      <text:p text:style-name="P2"><text:span text:style-name="Strong_20_Emphasis"><text:span text:style-name="T1">COMMENT ON TABLE public.opms IS 'Organizações/Unidades (OPM) responsáveis pelas viaturas.';</text:span></text:span></text:p>
      <text:p text:style-name="P2"><text:span text:style-name="Strong_20_Emphasis"><text:span text:style-name="T1">COMMENT ON TABLE public.orgaos IS 'Órgãos/unidades administrativas vinculadas ao sistema.';</text:span></text:span></text:p>
      <text:p text:style-name="P2"><text:span text:style-name="Strong_20_Emphasis"><text:span text:style-name="T1">COMMENT ON TABLE public.regioes IS 'Regiões administrativas/operacionais.';</text:span></text:span></text:p>
      <text:p text:style-name="P2"><text:span text:style-name="Strong_20_Emphasis"><text:span text:style-name="T1">COMMENT ON TABLE public.municipios IS 'Municípios de referência (localização geográfica).';</text:span></text:span></text:p>
      <text:p text:style-name="P2"><text:span text:style-name="Strong_20_Emphasis"><text:span text:style-name="T1">COMMENT ON TABLE public.usuarios IS 'Usuários do sistema, perfis e permissões de acesso.';</text:span></text:span></text:p>
      <text:p text:style-name="P2"><text:span text:style-name="Strong_20_Emphasis"><text:span text:style-name="T1">COMMENT ON TABLE public.usuario_orgao IS 'Relação usuário ↔ órgão/unidade.';</text:span></text:span></text:p>
      <text:p text:style-name="P2"><text:span text:style-name="Strong_20_Emphasis"><text:span text:style-name="T1">COMMENT ON TABLE public.radios IS 'Equipamentos de rádio (atribuição, modelo e status).';</text:span></text:span></text:p>
      <text:p text:style-name="P2"><text:span text:style-name="Strong_20_Emphasis"><text:span text:style-name="T1"/></text:span></text:p>
      <text:p text:style-name="P3"><text:span text:style-name="Strong_20_Emphasis"><text:span text:style-name="T1">-- ======= Comentários genéricos de colunas (ajuste ao seu modelo) =======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- Colunas padrão</text:span></text:span></text:p>
      <text:p text:style-name="P2"><text:span text:style-name="Strong_20_Emphasis"><text:span text:style-name="T1">COMMENT ON COLUMN public.veiculos.id IS 'Chave primária.';</text:span></text:span></text:p>
      <text:p text:style-name="P2"><text:span text:style-name="Strong_20_Emphasis"><text:span text:style-name="T1">COMMENT ON COLUMN public.veiculos.created_at IS 'Data/hora de criação do registro.';</text:span></text:span></text:p>
      <text:p text:style-name="P2"><text:span text:style-name="Strong_20_Emphasis"><text:span text:style-name="T1">COMMENT ON COLUMN public.veiculos.updated_at IS 'Data/hora da última atualização.'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- FKs mais comuns</text:span></text:span></text:p>
      <text:p text:style-name="P2"><text:span text:style-name="Strong_20_Emphasis"><text:span text:style-name="T1">COMMENT ON COLUMN public.veiculos.marca_modelo_id IS 'FK → marca_modelos.id';</text:span></text:span></text:p>
      <text:p text:style-name="P2"><text:soft-page-break/><text:span text:style-name="Strong_20_Emphasis"><text:span text:style-name="T1">COMMENT ON COLUMN public.veiculos.opm_id IS 'FK → opms.id';</text:span></text:span></text:p>
      <text:p text:style-name="P2"><text:span text:style-name="Strong_20_Emphasis"><text:span text:style-name="T1">COMMENT ON COLUMN public.documento_veiculos.veiculo_id IS 'FK → veiculos.id';</text:span></text:span></text:p>
      <text:p text:style-name="P2"><text:span text:style-name="Strong_20_Emphasis"><text:span text:style-name="T1">COMMENT ON COLUMN public.seguros.veiculo_id IS 'FK → veiculos.id';</text:span></text:span></text:p>
      <text:p text:style-name="P2"><text:span text:style-name="Strong_20_Emphasis"><text:span text:style-name="T1">COMMENT ON COLUMN public.veiculo_lotacoes.veiculo_id IS 'FK → veiculos.id';</text:span></text:span></text:p>
      <text:p text:style-name="P2"><text:span text:style-name="Strong_20_Emphasis"><text:span text:style-name="T1">COMMENT ON COLUMN public.veiculo_lotacoes.opm_id IS 'FK → opms.id';</text:span></text:span></text:p>
      <text:p text:style-name="P2"><text:span text:style-name="Strong_20_Emphasis"><text:span text:style-name="T1">COMMENT ON COLUMN public.manutencoes.veiculo_id IS 'FK → veiculos.id';</text:span></text:span></text:p>
      <text:p text:style-name="P2"><text:span text:style-name="Strong_20_Emphasis"><text:span text:style-name="T1">COMMENT ON COLUMN public.abastecimentos.veiculo_id IS 'FK → veiculos.id';</text:span></text:span></text:p>
      <text:p text:style-name="P2"><text:span text:style-name="Strong_20_Emphasis"><text:span text:style-name="T1">COMMENT ON COLUMN public.multas.veiculo_id IS 'FK → veiculos.id';</text:span></text:span></text:p>
      <text:p text:style-name="P2"><text:span text:style-name="Strong_20_Emphasis"><text:span text:style-name="T1">COMMENT ON COLUMN public.radios.veiculo_id IS 'FK → veiculos.id';</text:span></text:span></text:p>
      <text:p text:style-name="P2"><text:span text:style-name="Strong_20_Emphasis"><text:span text:style-name="T1">COMMENT ON COLUMN public.usuario_orgao.usuario_id IS 'FK → usuarios.id';</text:span></text:span></text:p>
      <text:p text:style-name="P2"><text:span text:style-name="Strong_20_Emphasis"><text:span text:style-name="T1">COMMENT ON COLUMN public.usuario_orgao.orgao_id IS 'FK → orgaos.id';</text:span></text:span></text:p>
      <text:p text:style-name="P2"><text:span text:style-name="Strong_20_Emphasis"><text:span text:style-name="T1"/></text:span></text:p>
      <text:p text:style-name="P3"><text:span text:style-name="Strong_20_Emphasis"><text:span text:style-name="T1">-- Exemplos de campos de estado/tipo/datas</text:span></text:span></text:p>
      <text:p text:style-name="P2"><text:span text:style-name="Strong_20_Emphasis"><text:span text:style-name="T1">COMMENT ON COLUMN public.veiculos.status IS 'Status operacional: ativo | inativa | manutencao.';</text:span></text:span></text:p>
      <text:p text:style-name="P2"><text:span text:style-name="Strong_20_Emphasis"><text:span text:style-name="T1">COMMENT ON COLUMN public.manutencoes.tipo IS 'Tipo: preventiva | corretiva.';</text:span></text:span></text:p>
      <text:p text:style-name="P2"><text:span text:style-name="Strong_20_Emphasis"><text:span text:style-name="T1">COMMENT ON COLUMN public.manutencoes.status IS 'Status do serviço (ex.: aberto, em_execucao, concluido).';</text:span></text:span></text:p>
      <text:p text:style-name="P2"><text:span text:style-name="Strong_20_Emphasis"><text:span text:style-name="T1">COMMENT ON COLUMN public.manutencoes.data_inicio IS 'Data de início da manutenção.';</text:span></text:span></text:p>
      <text:p text:style-name="P2"><text:span text:style-name="Strong_20_Emphasis"><text:span text:style-name="T1">COMMENT ON COLUMN public.manutencoes.data_fim IS 'Data de término da manutenção (se houver).';</text:span></text:span></text:p>
      <text:p text:style-name="P2"><text:span text:style-name="Strong_20_Emphasis"><text:span text:style-name="T1">COMMENT ON COLUMN public.documento_veiculos.tipo IS 'Tipo do documento (ex.: CRLV, licenciamento, seguro obrigatório, etc.).';</text:span></text:span></text:p>
      <text:p text:style-name="P2"><text:span text:style-name="Strong_20_Emphasis"><text:span text:style-name="T1">COMMENT ON COLUMN public.documento_veiculos.numero IS 'Número do documento.';</text:span></text:span></text:p>
      <text:p text:style-name="P2"><text:span text:style-name="Strong_20_Emphasis"><text:span text:style-name="T1">COMMENT ON COLUMN public.documento_veiculos.data_validade IS 'Validade do documento.';</text:span></text:span></text:p>
      <text:p text:style-name="P2"><text:span text:style-name="Strong_20_Emphasis"><text:span text:style-name="T1">COMMENT ON COLUMN public.abastecimentos.data IS 'Data do abastecimento.';</text:span></text:span></text:p>
      <text:p text:style-name="P2"><text:span text:style-name="Strong_20_Emphasis"><text:span text:style-name="T1">COMMENT ON COLUMN public.abastecimentos.odometro IS 'Odômetro no momento do abastecimento.';</text:span></text:span></text:p>
      <text:p text:style-name="P2"><text:span text:style-name="Strong_20_Emphasis"><text:span text:style-name="T1">COMMENT ON COLUMN public.abastecimentos.volume IS 'Volume abastecido.';</text:span></text:span></text:p>
      <text:p text:style-name="P2"><text:span text:style-name="Strong_20_Emphasis"><text:span text:style-name="T1">COMMENT ON COLUMN public.abastecimentos.custo IS 'Custo total do abastecimento.';</text:span></text:span></text:p>
      <text:p text:style-name="P2"><text:span text:style-name="Strong_20_Emphasis"><text:span text:style-name="T1">COMMENT ON COLUMN public.veiculo_lotacoes.data_inicio IS 'Início da lotação na OPM.';</text:span></text:span></text:p>
      <text:p text:style-name="P2"><text:span text:style-name="Strong_20_Emphasis"><text:span text:style-name="T1">COMMENT ON COLUMN public.veiculo_lotacoes.data_fim IS 'Fim da lotação na OPM (se houver).';</text:span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0:47:36.268425849</meta:creation-date>
    <meta:editing-duration>PT5M1S</meta:editing-duration>
    <meta:editing-cycles>2</meta:editing-cycles>
    <meta:generator>LibreOffice/25.2.4.3$Linux_X86_64 LibreOffice_project/520$Build-3</meta:generator>
    <dc:date>2025-08-11T10:52:35.708555030</dc:date>
    <meta:document-statistic meta:table-count="0" meta:image-count="0" meta:object-count="0" meta:page-count="2" meta:paragraph-count="50" meta:word-count="487" meta:character-count="4093" meta:non-whitespace-character-count="3656"/>
  </office:meta>
</office:document-meta>
</file>